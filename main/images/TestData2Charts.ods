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 UI" svg:font-family="'Microsoft YaHei UI'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/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lef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4" table:default-cell-style-name="Default"/>
        <table:table-column table:style-name="co2" table:number-columns-repeated="16369"/>
        <table:table-row table:style-name="ro1">
          <table:table-cell/>
          <table:table-cell office:value-type="string" calcext:value-type="string">
            <text:p>PoleMove</text:p>
          </table:table-cell>
          <table:table-cell office:value-type="string" calcext:value-type="string">
            <text:p>ArmMove(mm)</text:p>
          </table:table-cell>
          <table:table-cell/>
          <table:table-cell office:value-type="string" calcext:value-type="string">
            <text:p>Feedback</text:p>
          </table:table-cell>
          <table:table-cell table:number-columns-repeated="2"/>
          <table:table-cell office:value-type="string" calcext:value-type="string">
            <text:p>PoleMove</text:p>
          </table:table-cell>
          <table:table-cell office:value-type="string" calcext:value-type="string">
            <text:p>ArmMove(mm)</text:p>
          </table:table-cell>
          <table:table-cell/>
          <table:table-cell office:value-type="string" calcext:value-type="string">
            <text:p>PoleActual</text:p>
          </table:table-cell>
          <table:table-cell table:number-columns-repeated="2"/>
          <table:table-cell office:value-type="string" calcext:value-type="string">
            <text:p>ArmMove(mm)</text:p>
          </table:table-cell>
          <table:table-cell office:value-type="string" calcext:value-type="string">
            <text:p>PoleMove</text:p>
          </table:table-cell>
          <table:table-cell table:style-name="Default" table:number-columns-repeated="1636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49.84" calcext:value-type="float">
            <text:p>49.84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42.1" calcext:value-type="float">
            <text:p>42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01.14" calcext:value-type="float">
            <text:p>101.14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63.55" calcext:value-type="float">
            <text:p>63.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152.43" calcext:value-type="float">
            <text:p>152.43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85.81" calcext:value-type="float">
            <text:p>85.8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15" calcext:value-type="float">
            <text:p>1515</text:p>
          </table:table-cell>
          <table:table-cell/>
          <table:table-cell office:value-type="float" office:value="204.21" calcext:value-type="float">
            <text:p>204.21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07.91" calcext:value-type="float">
            <text:p>107.9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255.66" calcext:value-type="float">
            <text:p>255.66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250" calcext:value-type="float">
            <text:p>250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129.85" calcext:value-type="float">
            <text:p>129.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261.31" calcext:value-type="float">
            <text:p>261.31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255" calcext:value-type="float">
            <text:p>255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152.43" calcext:value-type="float">
            <text:p>152.4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2037" calcext:value-type="float">
            <text:p>2037</text:p>
          </table:table-cell>
          <table:table-cell/>
          <table:table-cell office:value-type="float" office:value="266.47" calcext:value-type="float">
            <text:p>266.47</text:p>
          </table:table-cell>
          <table:table-cell table:number-columns-repeated="2"/>
          <table:table-cell office:value-type="float" office:value="2037" calcext:value-type="float">
            <text:p>2037</text:p>
          </table:table-cell>
          <table:table-cell office:value-type="float" office:value="260" calcext:value-type="float">
            <text:p>260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174.04" calcext:value-type="float">
            <text:p>174.04</text:p>
          </table:table-cell>
          <table:table-cell table:number-columns-repeated="2"/>
          <table:table-cell>
            <draw:frame table:end-cell-address="Sheet1.N26" table:end-x="1.672cm" table:end-y="0.411cm" draw:z-index="0" draw:name="Chart 4" draw:style-name="gr1" draw:text-style-name="P1" svg:width="13.041cm" svg:height="7.788cm" svg:x="1.334cm" svg:y="0.243cm">
              <draw:object draw:notify-on-update-of-ranges="Sheet1.C1:Sheet1.C1 Sheet1.C2:Sheet1.C15 Sheet1.B2:Sheet1.B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S26" table:end-x="0.783cm" table:end-y="0.306cm" draw:z-index="1" draw:name="Chart 1" draw:style-name="gr1" draw:text-style-name="P1" svg:width="13.079cm" svg:height="7.788cm" svg:x="1.842cm" svg:y="0.138cm">
              <draw:object draw:notify-on-update-of-ranges="Sheet1.I1:Sheet1.I1 Sheet1.I2:Sheet1.I9 Sheet1.H2:Sheet1.H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Default" table:number-columns-repeated="1636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float" office:value="195.66" calcext:value-type="float">
            <text:p>195.66</text:p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float" office:value="217.11" calcext:value-type="float">
            <text:p>217.11</text:p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float" office:value="238.89" calcext:value-type="float">
            <text:p>238.89</text:p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260.18" calcext:value-type="float">
            <text:p>260.18</text:p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float" office:value="271.95" calcext:value-type="float">
            <text:p>271.95</text:p>
          </table:table-cell>
          <table:table-cell table:number-columns-repeated="10"/>
          <table:table-cell table:style-name="Default" table:number-columns-repeated="16369"/>
        </table:table-row>
        <table:table-row table:style-name="ro1" table:number-rows-repeated="2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ArmMove(mm)</text:p>
          </table:table-cell>
          <table:table-cell office:value-type="string" calcext:value-type="string">
            <text:p>PoleMove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100" calcext:value-type="float">
            <text:p>10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office:value-type="float" office:value="120" calcext:value-type="float">
            <text:p>12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>
            <draw:frame table:end-cell-address="Sheet1.N43" table:end-x="1.883cm" table:end-y="0.137cm" draw:z-index="2" draw:name="Chart 2" draw:style-name="gr1" draw:text-style-name="P1" svg:width="13.041cm" svg:height="7.8cm" svg:x="1.545cm" svg:y="0.434cm">
              <draw:object draw:notify-on-update-of-ranges="Sheet1.D18:Sheet1.D18 Sheet1.D19:Sheet1.D32 Sheet1.C19:Sheet1.C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S43" table:end-x="1.672cm" table:end-y="0.158cm" draw:z-index="3" draw:name="Chart 3" draw:style-name="gr1" draw:text-style-name="P1" svg:width="13.079cm" svg:height="7.8cm" svg:x="2.731cm" svg:y="0.455cm">
              <draw:object draw:notify-on-update-of-ranges="Sheet1.O1:Sheet1.O1 Sheet1.O2:Sheet1.O9 Sheet1.N2:Sheet1.N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160" calcext:value-type="float">
            <text:p>16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1389" calcext:value-type="float">
            <text:p>1389</text:p>
          </table:table-cell>
          <table:table-cell office:value-type="float" office:value="180" calcext:value-type="float">
            <text:p>18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1572" calcext:value-type="float">
            <text:p>1572</text:p>
          </table:table-cell>
          <table:table-cell office:value-type="float" office:value="200" calcext:value-type="float">
            <text:p>20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1752" calcext:value-type="float">
            <text:p>1752</text:p>
          </table:table-cell>
          <table:table-cell office:value-type="float" office:value="220" calcext:value-type="float">
            <text:p>22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240" calcext:value-type="float">
            <text:p>240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office:value-type="float" office:value="250" calcext:value-type="float">
            <text:p>250</text:p>
          </table:table-cell>
          <table:table-cell table:number-columns-repeated="11"/>
          <table:table-cell table:style-name="Default" table:number-columns-repeated="16369"/>
        </table:table-row>
        <table:table-row table:style-name="ro1" table:number-rows-repeated="68">
          <table:table-cell table:number-columns-repeated="15"/>
          <table:table-cell table:style-name="Default" table:number-columns-repeated="16369"/>
        </table:table-row>
        <table:table-row table:style-name="ro2" table:number-rows-repeated="1048475">
          <table:table-cell table:number-columns-repeated="15"/>
          <table:table-cell table:style-name="Default" table:number-columns-repeated="16369"/>
        </table:table-row>
        <table:table-row table:style-name="ro2">
          <table:table-cell table:number-columns-repeated="15"/>
          <table:table-cell table:style-name="Default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 UI" svg:font-family="'Microsoft YaHei UI'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2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2P2" style:volatile="true">
      <number:text loext:blank-width-char=" "> </number:text>
      <number:fill-character> </number:fill-character>
      <number:text loext:blank-width-char=" 1">-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 "> ￥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3P1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3P2" style:volatile="true">
      <number:text loext:blank-width-char=" "> ￥</number:text>
      <number:fill-character> </number:fill-character>
      <number:text loext:blank-width-char=" 1">-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4">
      <number:text loext:blank-width-char=" "> </number:text>
      <number:text-content/>
      <number:text loext:blank-width-char=" 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 "> ￥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5P1" style:volatile="true">
      <number:text loext:blank-width-char=" "> ￥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5P2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5">
      <number:text loext:blank-width-char=" "> </number:text>
      <number:text-content/>
      <number:text loext:blank-width-char=" 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WPS">
      <loext:theme-colors loext:name="WPS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874cb"/>
        <loext:color loext:name="accent2" loext:color="#ee822f"/>
        <loext:color loext:name="accent3" loext:color="#f2ba02"/>
        <loext:color loext:name="accent4" loext:color="#75bd42"/>
        <loext:color loext:name="accent5" loext:color="#30c0b4"/>
        <loext:color loext:name="accent6" loext:color="#e54c5e"/>
        <loext:color loext:name="hyperlink" loext:color="#0026e5"/>
        <loext:color loext:name="followed-hyperlink" loext:color="#7e1fa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an</meta:initial-creator>
    <dc:creator>Sheng Rao</dc:creator>
    <meta:creation-date>2026-05-13T08:07:35</meta:creation-date>
    <dc:date>2026-05-14T09:23:35</dc:date>
    <meta:generator>LibreOffice/26.2.0.3$Windows_X86_64 LibreOffice_project/620$Build-3</meta:generator>
    <meta:document-statistic meta:table-count="1" meta:cell-count="120" meta:object-count="4"/>
    <meta:user-defined meta:name="AppVersion">16.0300</meta:user-defined>
    <meta:user-defined meta:name="CalculationRule" meta:value-type="float">1</meta:user-defined>
    <meta:user-defined meta:name="ICV">FC16C9F1E5A0483D83C987DB023F1EA6_11</meta:user-defined>
    <meta:user-defined meta:name="KSOProductBuildVer">2052-12.1.0.25865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>
        <loext:stroke-complex-color loext:theme-type="dark1" loext:color-type="theme">
          <loext:transformation loext:type="lummod" loext:value="1500"/>
          <loext:transformation loext:type="lumoff" loext:value="8500"/>
        </loext:stroke-complex-color>
      </style:graphic-properties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>
        <loext:stroke-complex-color loext:theme-type="dark1" loext:color-type="theme">
          <loext:transformation loext:type="lummod" loext:value="2500"/>
          <loext:transformation loext:type="lumoff" loext:value="7500"/>
        </loext:stroke-complex-color>
      </style:graphic-properties>
      <style:text-properties fo:color="#595959" style:text-position="0% 100%" fo:font-family="Calibri" fo:font-size="9pt" style:font-size-asian="9pt" style:font-size-complex="9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h5" style:family="chart">
      <style:graphic-properties svg:stroke-width="0.026cm" svg:stroke-color="#d9d9d9">
        <loext:stroke-complex-color loext:theme-type="dark1" loext:color-type="theme">
          <loext:transformation loext:type="lummod" loext:value="1500"/>
          <loext:transformation loext:type="lumoff" loext:value="8500"/>
        </loext:stroke-complex-color>
      </style:graphic-properties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874cb" svg:stroke-linecap="round" draw:fill-color="#4874cb" fo:wrap-option="wrap">
        <loext:fill-complex-color loext:theme-type="accent1" loext:color-type="theme"/>
      </style:graphic-properties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c81d31" svg:stroke-linecap="round">
        <loext:stroke-complex-color loext:theme-type="accent6" loext:color-type="theme">
          <loext:transformation loext:type="lummod" loext:value="7500"/>
        </loext:stroke-complex-color>
      </style:graphic-properties>
    </style:style>
    <style:style style:name="ch9" style:family="chart">
      <style:text-properties fo:color="#595959" style:text-position="0% 100%" fo:font-family="Calibri" fo:font-size="9pt" style:font-size-asian="9pt" style:font-size-complex="9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</office:automatic-styles>
  <office:body>
    <office:chart>
      <chart:chart svg:width="13.042cm" svg:height="7.789cm" xlink:href=".." xlink:type="simple" chart:class="chart:scatter" chart:style-name="ch1">
        <chart:title svg:x="2.505cm" svg:y="0.291cm" chart:style-name="ch2">
          <text:p><text:span text:style-name="T1">PoleMove vs ArmMove</text:span><text:span text:style-name="T1"> (20 increments)</text:span></text:p>
        </chart:title>
        <chart:plot-area chart:style-name="ch3" svg:x="1.281cm" svg:y="1.189cm" svg:width="11.501cm" svg:height="5.454cm">
          <chart:coordinate-region svg:x="2.026cm" svg:y="1.349cm" svg:width="10.514cm" svg:height="4.876cm"/>
          <chart:axis chart:dimension="x" chart:name="primary-x" chart:style-name="ch4">
            <chart:title svg:x="6.234cm" svg:y="6.798cm" chart:style-name="ch2">
              <text:p><text:span text:style-name="T2">PoleMove</text:span></text:p>
            </chart:title>
            <chart:grid chart:style-name="ch5" chart:class="major"/>
          </chart:axis>
          <chart:axis chart:dimension="y" chart:name="primary-y" chart:style-name="ch4">
            <chart:title svg:x="0.451cm" svg:y="5.099cm" chart:style-name="ch6">
              <text:p><text:span text:style-name="T2">ArmMove(mm)</text:span></text:p>
            </chart:title>
            <chart:grid chart:style-name="ch5" chart:class="major"/>
          </chart:axis>
          <chart:series chart:style-name="ch7" chart:values-cell-range-address="Sheet1.C2:Sheet1.C15" chart:label-cell-address="Sheet1.C1:Sheet1.C1" chart:class="chart:scatter">
            <chart:domain table:cell-range-address="Sheet1.B2:Sheet1.B15"/>
            <chart:regression-curve chart:style-name="ch8">
              <chart:equation chart:display-equation="true" chart:display-r-square="true" chart:style-name="ch9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ArmMove(mm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  <table:table-cell office:value-type="float" office:value="0">
                <text:p>0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2039">
                <text:p>2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msLineDash_20_1" draw:display-name="msLineDash 1" draw:style="round" draw:dots1="1" draw:dots1-length="1%" draw:distance="1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>
        <loext:stroke-complex-color loext:theme-type="dark1" loext:color-type="theme">
          <loext:transformation loext:type="lummod" loext:value="1500"/>
          <loext:transformation loext:type="lumoff" loext:value="8500"/>
        </loext:stroke-complex-color>
      </style:graphic-properties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>
        <loext:stroke-complex-color loext:theme-type="dark1" loext:color-type="theme">
          <loext:transformation loext:type="lummod" loext:value="2500"/>
          <loext:transformation loext:type="lumoff" loext:value="7500"/>
        </loext:stroke-complex-color>
      </style:graphic-properties>
      <style:text-properties fo:color="#595959" style:text-position="0% 100%" fo:font-family="Calibri" fo:font-size="9pt" style:font-size-asian="9pt" style:font-size-complex="9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h5" style:family="chart">
      <style:graphic-properties svg:stroke-width="0.026cm" svg:stroke-color="#d9d9d9">
        <loext:stroke-complex-color loext:theme-type="dark1" loext:color-type="theme">
          <loext:transformation loext:type="lummod" loext:value="1500"/>
          <loext:transformation loext:type="lumoff" loext:value="8500"/>
        </loext:stroke-complex-color>
      </style:graphic-properties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874cb" svg:stroke-linecap="round" draw:fill-color="#4874cb" fo:wrap-option="wrap">
        <loext:fill-complex-color loext:theme-type="accent1" loext:color-type="theme"/>
      </style:graphic-properties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c81d31" svg:stroke-linecap="round">
        <loext:stroke-complex-color loext:theme-type="accent6" loext:color-type="theme">
          <loext:transformation loext:type="lummod" loext:value="7500"/>
        </loext:stroke-complex-color>
      </style:graphic-properties>
    </style:style>
    <style:style style:name="ch9" style:family="chart">
      <style:text-properties fo:color="#595959" style:text-position="0% 100%" fo:font-family="Calibri" fo:font-size="9pt" style:font-size-asian="9pt" style:font-size-complex="9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</office:automatic-styles>
  <office:body>
    <office:chart>
      <chart:chart svg:width="13.08cm" svg:height="7.789cm" xlink:href=".." xlink:type="simple" chart:class="chart:scatter" chart:style-name="ch1">
        <chart:title svg:x="2.511cm" svg:y="0.291cm" chart:style-name="ch2">
          <text:p><text:span text:style-name="T1">PoleMove vs ArmMove (50 increments)</text:span></text:p>
        </chart:title>
        <chart:plot-area chart:style-name="ch3" svg:x="1.324cm" svg:y="1.231cm" svg:width="11.495cm" svg:height="5.412cm">
          <chart:coordinate-region svg:x="2.069cm" svg:y="1.391cm" svg:width="10.507cm" svg:height="4.834cm"/>
          <chart:axis chart:dimension="x" chart:name="primary-x" chart:style-name="ch4">
            <chart:title svg:x="6.274cm" svg:y="6.798cm" chart:style-name="ch2">
              <text:p><text:span text:style-name="T2">PoleMove</text:span></text:p>
            </chart:title>
            <chart:grid chart:style-name="ch5" chart:class="major"/>
          </chart:axis>
          <chart:axis chart:dimension="y" chart:name="primary-y" chart:style-name="ch4">
            <chart:title svg:x="0.451cm" svg:y="5.172cm" chart:style-name="ch6">
              <text:p><text:span text:style-name="T2">ArmMove</text:span><text:span text:style-name="T2"> (mm)</text:span></text:p>
            </chart:title>
            <chart:grid chart:style-name="ch5" chart:class="major"/>
          </chart:axis>
          <chart:series chart:style-name="ch7" chart:values-cell-range-address="Sheet1.I2:Sheet1.I9" chart:label-cell-address="Sheet1.I1:Sheet1.I1" chart:class="chart:scatter">
            <chart:domain table:cell-range-address="Sheet1.H2:Sheet1.H9"/>
            <chart:regression-curve chart:style-name="ch8">
              <chart:equation chart:display-equation="true" chart:display-r-square="true" chart:style-name="ch9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ArmMove(mm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9</svg:desc>
                </draw:g>
              </table:table-cell>
              <table:table-cell office:value-type="float" office:value="0">
                <text:p>0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">
                <text:p>260</text:p>
              </table:table-cell>
              <table:table-cell office:value-type="float" office:value="2037">
                <text:p>2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msLineDash_20_1" draw:display-name="msLineDash 1" draw:style="round" draw:dots1="1" draw:dots1-length="1%" draw:distance="1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>
        <loext:stroke-complex-color loext:theme-type="dark1" loext:color-type="theme">
          <loext:transformation loext:type="lummod" loext:value="1500"/>
          <loext:transformation loext:type="lumoff" loext:value="8500"/>
        </loext:stroke-complex-color>
      </style:graphic-properties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>
        <loext:stroke-complex-color loext:theme-type="dark1" loext:color-type="theme">
          <loext:transformation loext:type="lummod" loext:value="2500"/>
          <loext:transformation loext:type="lumoff" loext:value="7500"/>
        </loext:stroke-complex-color>
      </style:graphic-properties>
      <style:text-properties fo:color="#595959" style:text-position="0% 100%" fo:font-family="Calibri" fo:font-size="9pt" style:font-size-asian="9pt" style:font-size-complex="9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h5" style:family="chart">
      <style:graphic-properties svg:stroke-width="0.026cm" svg:stroke-color="#d9d9d9">
        <loext:stroke-complex-color loext:theme-type="dark1" loext:color-type="theme">
          <loext:transformation loext:type="lummod" loext:value="1500"/>
          <loext:transformation loext:type="lumoff" loext:value="8500"/>
        </loext:stroke-complex-color>
      </style:graphic-properties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874cb" svg:stroke-linecap="round" draw:fill-color="#4874cb" fo:wrap-option="wrap">
        <loext:fill-complex-color loext:theme-type="accent1" loext:color-type="theme"/>
      </style:graphic-properties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c81d31" svg:stroke-linecap="round">
        <loext:stroke-complex-color loext:theme-type="accent6" loext:color-type="theme">
          <loext:transformation loext:type="lummod" loext:value="7500"/>
        </loext:stroke-complex-color>
      </style:graphic-properties>
    </style:style>
    <style:style style:name="ch9" style:family="chart">
      <style:text-properties fo:color="#595959" style:text-position="0% 100%" fo:font-family="Calibri" fo:font-size="9pt" style:font-size-asian="9pt" style:font-size-complex="9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</office:automatic-styles>
  <office:body>
    <office:chart>
      <chart:chart svg:width="13.042cm" svg:height="7.801cm" xlink:href=".." xlink:type="simple" chart:class="chart:scatter" chart:style-name="ch1">
        <chart:title svg:x="2.492cm" svg:y="0.291cm" chart:style-name="ch2">
          <text:p><text:span text:style-name="T1">ArmMove vs PoleMove (20 increments)
</text:span></text:p>
        </chart:title>
        <chart:plot-area chart:style-name="ch3" svg:x="1.281cm" svg:y="1.722cm" svg:width="11.501cm" svg:height="4.932cm">
          <chart:coordinate-region svg:x="1.865cm" svg:y="1.883cm" svg:width="10.594cm" svg:height="4.353cm"/>
          <chart:axis chart:dimension="x" chart:name="primary-x" chart:style-name="ch4">
            <chart:title svg:x="5.808cm" svg:y="6.81cm" chart:style-name="ch2">
              <text:p><text:span text:style-name="T2">ArmMove (mm)</text:span></text:p>
            </chart:title>
            <chart:grid chart:style-name="ch5" chart:class="major"/>
          </chart:axis>
          <chart:axis chart:dimension="y" chart:name="primary-y" chart:style-name="ch4">
            <chart:title svg:x="0.451cm" svg:y="4.985cm" chart:style-name="ch6">
              <text:p><text:span text:style-name="T2">PoleMove</text:span></text:p>
            </chart:title>
            <chart:grid chart:style-name="ch5" chart:class="major"/>
          </chart:axis>
          <chart:series chart:style-name="ch7" chart:values-cell-range-address="Sheet1.D19:Sheet1.D32" chart:label-cell-address="Sheet1.D18:Sheet1.D18" chart:class="chart:scatter">
            <chart:domain table:cell-range-address="Sheet1.C19:Sheet1.C32"/>
            <chart:regression-curve chart:style-name="ch8">
              <chart:equation chart:display-equation="true" chart:display-r-square="true" chart:style-name="ch9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PoleMove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9:Sheet1.C32</svg:desc>
                </draw:g>
              </table:table-cell>
              <table:table-cell office:value-type="float" office:value="0">
                <text:p>0</text:p>
                <draw:g>
                  <svg:desc>Sheet1.D19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9">
                <text:p>2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">
                <text:p>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8">
                <text:p>5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6">
                <text:p>7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">
                <text:p>8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3">
                <text:p>10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6">
                <text:p>12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9">
                <text:p>13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">
                <text:p>15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2">
                <text:p>17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0">
                <text:p>19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9">
                <text:p>2039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msLineDash_20_1" draw:display-name="msLineDash 1" draw:style="round" draw:dots1="1" draw:dots1-length="1%" draw:distance="199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>
        <loext:stroke-complex-color loext:theme-type="dark1" loext:color-type="theme">
          <loext:transformation loext:type="lummod" loext:value="1500"/>
          <loext:transformation loext:type="lumoff" loext:value="8500"/>
        </loext:stroke-complex-color>
      </style:graphic-properties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>
        <loext:stroke-complex-color loext:theme-type="dark1" loext:color-type="theme">
          <loext:transformation loext:type="lummod" loext:value="2500"/>
          <loext:transformation loext:type="lumoff" loext:value="7500"/>
        </loext:stroke-complex-color>
      </style:graphic-properties>
      <style:text-properties fo:color="#595959" style:text-position="0% 100%" fo:font-family="Calibri" fo:font-size="9pt" style:font-size-asian="9pt" style:font-size-complex="9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h5" style:family="chart">
      <style:graphic-properties svg:stroke-width="0.026cm" svg:stroke-color="#d9d9d9">
        <loext:stroke-complex-color loext:theme-type="dark1" loext:color-type="theme">
          <loext:transformation loext:type="lummod" loext:value="1500"/>
          <loext:transformation loext:type="lumoff" loext:value="8500"/>
        </loext:stroke-complex-color>
      </style:graphic-properties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874cb" svg:stroke-linecap="round" draw:fill-color="#4874cb" fo:wrap-option="wrap">
        <loext:fill-complex-color loext:theme-type="accent1" loext:color-type="theme"/>
      </style:graphic-properties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c81d31" svg:stroke-linecap="round">
        <loext:stroke-complex-color loext:theme-type="accent6" loext:color-type="theme">
          <loext:transformation loext:type="lummod" loext:value="7500"/>
        </loext:stroke-complex-color>
      </style:graphic-properties>
    </style:style>
    <style:style style:name="ch9" style:family="chart">
      <style:text-properties fo:color="#595959" style:text-position="0% 100%" fo:font-family="Calibri" fo:font-size="9pt" style:font-size-asian="9pt" style:font-size-complex="9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</office:automatic-styles>
  <office:body>
    <office:chart>
      <chart:chart svg:width="13.08cm" svg:height="7.801cm" xlink:href=".." xlink:type="simple" chart:class="chart:scatter" chart:style-name="ch1">
        <chart:title svg:x="2.511cm" svg:y="0.292cm" chart:style-name="ch2">
          <text:p><text:span text:style-name="T1">PoleMove vs ArmMove (50 increments)</text:span></text:p>
        </chart:title>
        <chart:plot-area chart:style-name="ch3" svg:x="1.282cm" svg:y="1.233cm" svg:width="11.537cm" svg:height="5.421cm">
          <chart:coordinate-region svg:x="1.866cm" svg:y="1.393cm" svg:width="10.629cm" svg:height="4.843cm"/>
          <chart:axis chart:dimension="x" chart:name="primary-x" chart:style-name="ch4">
            <chart:title svg:x="5.827cm" svg:y="6.81cm" chart:style-name="ch2">
              <text:p><text:span text:style-name="T2">ArmMove (mm)</text:span></text:p>
            </chart:title>
            <chart:grid chart:style-name="ch5" chart:class="major"/>
          </chart:axis>
          <chart:axis chart:dimension="y" chart:name="primary-y" chart:style-name="ch4">
            <chart:title svg:x="0.451cm" svg:y="4.74cm" chart:style-name="ch6">
              <text:p><text:span text:style-name="T2">PoleMove</text:span></text:p>
            </chart:title>
            <chart:grid chart:style-name="ch5" chart:class="major"/>
          </chart:axis>
          <chart:series chart:style-name="ch7" chart:values-cell-range-address="Sheet1.O2:Sheet1.O9" chart:label-cell-address="Sheet1.O1:Sheet1.O1" chart:class="chart:scatter">
            <chart:domain table:cell-range-address="Sheet1.N2:Sheet1.N9"/>
            <chart:regression-curve chart:style-name="ch8">
              <chart:equation chart:display-equation="true" chart:display-r-square="true" chart:style-name="ch9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N</text:p>
              </table:table-cell>
              <table:table-cell office:value-type="string">
                <text:p>PoleMov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:Sheet1.N9</svg:desc>
                </draw:g>
              </table:table-cell>
              <table:table-cell office:value-type="float" office:value="0">
                <text:p>0</text:p>
                <draw:g>
                  <svg:desc>Sheet1.O2:Sheet1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">
                <text:p>3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0">
                <text:p>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">
                <text:p>10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5">
                <text:p>15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0">
                <text:p>19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8">
                <text:p>19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7">
                <text:p>2037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msLineDash_20_1" draw:display-name="msLineDash 1" draw:style="round" draw:dots1="1" draw:dots1-length="1%" draw:distance="199%"/>
  </office:styles>
</office:document-styles>
</file>